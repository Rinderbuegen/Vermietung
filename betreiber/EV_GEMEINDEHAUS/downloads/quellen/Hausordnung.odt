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7cf7" officeooo:paragraph-rsid="000a7cf7"/>
    </style:style>
    <style:style style:name="P2" style:family="paragraph" style:parent-style-name="Standard">
      <style:text-properties officeooo:paragraph-rsid="000a7cf7"/>
    </style:style>
    <style:style style:name="T1" style:family="text">
      <style:text-properties officeooo:rsid="000a7c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e Hausordnung</text:p>
      <text:p text:style-name="P1"/>
      <text:p text:style-name="P2"><text:span text:style-name="T1">Test!<text:line-break/><text:line-break/></text:span>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 <text:line-break/><text:line-break/>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 <text:line-break/><text:line-break/>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7-10T13:53:05.969000000</meta:creation-date>
    <dc:date>2026-07-10T13:56:04.619000000</dc:date>
    <meta:editing-duration>PT1M18S</meta:editing-duration>
    <meta:editing-cycles>2</meta:editing-cycles>
    <meta:generator>LibreOffice/24.2.0.3$Windows_X86_64 LibreOffice_project/da48488a73ddd66ea24cf16bbc4f7b9c08e9bea1</meta:generator>
    <meta:keyword>Hausordung</meta:keyword>
    <dc:contributor>Monika Heß</dc:contributor>
    <dc:contributor>Peter Heß</dc:contributor>
    <dc:subject>Die aktuelle Hausordung des ev. Gemeindeshauses Rinderbügen</dc:subject>
    <dc:title>Hausordnung </dc:title>
    <meta:print-date>2026-07-10T13:55:59.702000000</meta:print-date>
    <meta:printed-by>PDF-Dateien</meta:printed-by>
    <meta:document-statistic meta:table-count="0" meta:image-count="0" meta:object-count="0" meta:page-count="1" meta:paragraph-count="2" meta:word-count="390" meta:character-count="2624" meta:non-whitespace-character-count="2230"/>
  </office:meta>
</office:document-meta>
</file>